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5000001259FF82AB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4">
      <style:paragraph-properties fo:text-align="start" style:justify-single-word="false"/>
      <style:text-properties fo:font-size="14pt" officeooo:rsid="001d895d" officeooo:paragraph-rsid="001cc9d9" style:font-size-asian="14pt" style:font-size-complex="14pt"/>
    </style:style>
    <style:style style:name="P2" style:family="paragraph" style:parent-style-name="Heading_20_4">
      <style:text-properties fo:font-size="14pt" style:font-size-asian="14pt" style:font-size-complex="14pt"/>
    </style:style>
    <style:style style:name="P3" style:family="paragraph" style:parent-style-name="Heading_20_5">
      <style:text-properties fo:font-size="12pt" style:font-size-asian="12pt" style:font-size-complex="12pt"/>
    </style:style>
    <style:style style:name="P4" style:family="paragraph" style:parent-style-name="Standard">
      <style:paragraph-properties fo:text-align="start" style:justify-single-word="false"/>
      <style:text-properties officeooo:rsid="001d895d" officeooo:paragraph-rsid="001cc9d9"/>
    </style:style>
    <style:style style:name="P5" style:family="paragraph" style:parent-style-name="Standard">
      <style:paragraph-properties fo:text-align="start" style:justify-single-word="false"/>
      <style:text-properties fo:font-size="32pt" fo:font-weight="bold" officeooo:rsid="001cc9d9" officeooo:paragraph-rsid="001cc9d9" style:font-size-asian="32pt" style:font-weight-asian="bold" style:font-size-complex="32pt" style:font-weight-complex="bold"/>
    </style:style>
    <style:style style:name="P6" style:family="paragraph" style:parent-style-name="Standard">
      <style:paragraph-properties fo:text-align="start" style:justify-single-word="false"/>
      <style:text-properties fo:color="#1c1c1c" loext:opacity="100%" officeooo:rsid="001d895d" officeooo:paragraph-rsid="001cc9d9"/>
    </style:style>
    <style:style style:name="P7" style:family="paragraph" style:parent-style-name="Standard">
      <style:paragraph-properties fo:text-align="start" style:justify-single-word="false"/>
      <style:text-properties fo:font-size="12pt" officeooo:rsid="001d895d" officeooo:paragraph-rsid="001cc9d9" style:font-size-asian="12pt" style:font-size-complex="12pt"/>
    </style:style>
    <style:style style:name="P8" style:family="paragraph" style:parent-style-name="Text_20_body">
      <style:text-properties fo:font-size="12pt" style:font-size-asian="12pt" style:font-size-complex="12pt"/>
    </style:style>
    <style:style style:name="P9" style:family="paragraph" style:parent-style-name="Text_20_body" style:list-style-name="L1">
      <style:paragraph-properties fo:margin-top="0in" fo:margin-bottom="0in" style:contextual-spacing="false"/>
      <style:text-properties fo:font-size="12pt" style:font-size-asian="12pt" style:font-size-complex="12pt"/>
    </style:style>
    <style:style style:name="P10" style:family="paragraph" style:parent-style-name="Text_20_body" style:list-style-name="L1">
      <style:text-properties fo:font-size="12pt" style:font-size-asian="12pt" style:font-size-complex="12pt"/>
    </style:style>
    <style:style style:name="P11" style:family="paragraph" style:parent-style-name="Text_20_body" style:list-style-name="L2">
      <style:text-properties fo:font-size="12pt" style:font-size-asian="12pt" style:font-size-complex="12pt"/>
    </style:style>
    <style:style style:name="P12" style:family="paragraph" style:parent-style-name="Text_20_body">
      <style:text-properties fo:font-size="12pt" officeooo:paragraph-rsid="001cc9d9" style:font-size-asian="12pt" style:font-size-complex="12pt"/>
    </style:style>
    <style:style style:name="P13" style:family="paragraph" style:parent-style-name="Text_20_body">
      <style:text-properties officeooo:paragraph-rsid="001cc9d9"/>
    </style:style>
    <style:style style:name="P14" style:family="paragraph">
      <loext:graphic-properties draw:fill-color="#333333"/>
      <style:paragraph-properties fo:text-align="center"/>
    </style:style>
    <style:style style:name="T1" style:family="text">
      <style:text-properties fo:color="#333333" loext:opacity="100%"/>
    </style:style>
    <style:style style:name="T2" style:family="text">
      <style:text-properties fo:color="#333333" loext:opacity="100%" fo:font-weight="bold" style:font-weight-asian="bold" style:font-weight-complex="bold"/>
    </style:style>
    <style:style style:name="T3" style:family="text">
      <style:text-properties fo:color="#666666" loext:opacity="100%"/>
    </style:style>
    <style:style style:name="T4" style:family="text">
      <style:text-properties officeooo:rsid="001cc9d9"/>
    </style:style>
    <style:style style:name="T5" style:family="text">
      <style:text-properties fo:font-variant="normal" fo:text-transform="none" fo:color="#252528" loext:opacity="100%" fo:letter-spacing="normal"/>
    </style:style>
    <style:style style:name="T6" style:family="text">
      <style:text-properties fo:font-size="12pt" style:font-size-asian="12pt" style:font-size-complex="12pt"/>
    </style:style>
    <style:style style:name="T7" style:family="text">
      <style:text-properties fo:font-size="12pt" officeooo:rsid="001cc9d9"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8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svg:stroke-width="0.0201in" svg:stroke-color="#333333" draw:fill-color="#333333"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1" draw:name="Image1" text:anchor-type="char" svg:x="5.4744in" svg:y="-0.2453in" svg:width="0.9783in" svg:height="1.0984in" draw:z-index="1"><draw:image xlink:href="Pictures/1000000100000105000001259FF82AB7.png" xlink:type="simple" xlink:show="embed" xlink:actuate="onLoad" draw:mime-type="image/png"/></draw:frame>Terms and Conditions</text:p>
      <text:p text:style-name="P6"><text:span text:style-name="T2">Last updated:</text:span><text:span text:style-name="T1"> </text:span><text:span text:style-name="T3">11. 06. 2024</text:span></text:p>
      <text:p text:style-name="P6"><text:span text:style-name="T3"/></text:p>
      <text:p text:style-name="P4"><draw:line text:anchor-type="paragraph" draw:z-index="0" draw:name="Horizontal line 1" draw:style-name="gr1" draw:text-style-name="P14" svg:x1="-0.0598in" svg:y1="0.0835in" svg:x2="6.7421in" svg:y2="0.0835in"><text:p/></draw:line></text:p>
      <text:p text:style-name="P4"/>
      <text:h text:style-name="P1" text:outline-level="4">Introduction</text:h>
      <text:p text:style-name="P8">Welcome to <text:span text:style-name="T4">Roadie</text:span>! These Terms and Conditions ("Terms") govern your use of our web application (the "Web App"). By accessing or using the Web App, you agree to be bound by these Terms. If you do not agree to these Terms, please do not use the Web App.</text:p>
      <text:p text:style-name="P8"/>
      <text:h text:style-name="P2" text:outline-level="4">1. Use of the Web App</text:h>
      <text:h text:style-name="P3" text:outline-level="5">1.1. Eligibility</text:h>
      <text:p text:style-name="P8">By using the Web App, you represent and warrant that you are at least 18 years of age and have the legal capacity to enter into these Terms.</text:p>
      <text:h text:style-name="P3" text:outline-level="5">1.2. User Account</text:h>
      <text:p text:style-name="P8">To access certain features of the Web App, you may be required to create an account. You agree to provide accurate, current, and complete information during the registration process and to update such information to keep it accurate, current, and complete. You are responsible for safeguarding your account information and for any activities or actions under your account.</text:p>
      <text:p text:style-name="P8"/>
      <text:h text:style-name="P2" text:outline-level="4">2. User Conduct</text:h>
      <text:p text:style-name="P8">You agree not to use the Web App to:</text:p>
      <text:list text:style-name="L1">
        <text:list-item>
          <text:p text:style-name="P9">Violate any local, state, national, or international law or regulation.</text:p>
        </text:list-item>
        <text:list-item>
          <text:p text:style-name="P9">Engage in any conduct that is harmful, fraudulent, deceptive, threatening, harassing, defamatory, obscene, or otherwise objectionable.</text:p>
        </text:list-item>
        <text:list-item>
          <text:p text:style-name="P9">Interfere with or disrupt the Web App or servers or networks connected to the Web App.</text:p>
        </text:list-item>
        <text:list-item>
          <text:p text:style-name="P10">Introduce any viruses, Trojan horses, worms, or other malicious software.</text:p>
          <text:p text:style-name="P10"/>
        </text:list-item>
      </text:list>
      <text:h text:style-name="P2" text:outline-level="4">3. Data Collection and Use</text:h>
      <text:h text:style-name="P3" text:outline-level="5">3.1. Weather Data</text:h>
      <text:p text:style-name="P8">Our Web App collects real-time weather data from third-party services to analyze and forecast incident probabilities and severities.</text:p>
      <text:h text:style-name="P3" text:outline-level="5">3.2. Firebase Data</text:h>
      <text:p text:style-name="P8">We use Firebase for data storage and analytics. Firebase may collect information such as device information, log information, location information, and usage data. For more details, please refer to our Privacy Policy.</text:p>
      <text:p text:style-name="P8"><text:soft-page-break/></text:p>
      <text:h text:style-name="P2" text:outline-level="4"><text:span text:style-name="T4">4</text:span>. Disclaimers and Limitation of Liability</text:h>
      <text:h text:style-name="P3" text:outline-level="5"><text:span text:style-name="T4">4</text:span>.1. Disclaimers</text:h>
      <text:p text:style-name="P8">The Web App is provided on an "as is" and "as available" basis. We make no representations or warranties of any kind, express or implied, regarding the operation or availability of the Web App or the information, content, or materials included on the Web App.</text:p>
      <text:h text:style-name="P3" text:outline-level="5"><text:span text:style-name="T4">4</text:span>.2. Limitation of Liability</text:h>
      <text:p text:style-name="P12">To the fullest extent permitted by law, <text:span text:style-name="T4">Team 14</text:span><text:span text:style-name="T5">™ </text:span>shall not be liable for any indirect, incidental, special, consequential, or punitive damages, including but not limited to loss of profits, data, use, goodwill, or other intangible losses, resulting from (i) your use or inability to use the Web App; (ii) any unauthorized access to or use of our servers and/or any personal information stored therein; (iii) any interruption or cessation of transmission to or from the Web App; and (iv) any bugs, viruses, Trojan horses, or the like that may be transmitted to or through our Web App by any third party.</text:p>
      <text:h text:style-name="P2" text:outline-level="4"><text:span text:style-name="T4">5</text:span>. Indemnification</text:h>
      <text:p text:style-name="P13"><text:span text:style-name="T6">You agree to indemnify, defend, and hold harmless </text:span><text:span text:style-name="T7">Team 14</text:span><text:span text:style-name="T5">™</text:span><text:span text:style-name="T6"> its officers, directors, employees, and agents, from and against any claims, liabilities, damages, judgments, awards, losses, costs, expenses, or fees (including reasonable attorneys' fees) arising out of or relating to your violation of these Terms or your use of the Web App.</text:span></text:p>
      <text:h text:style-name="P2" text:outline-level="4"><text:span text:style-name="T4">6</text:span>. Changes to the Terms</text:h>
      <text:p text:style-name="P8">We may update these Terms from time to time. We will notify you of any changes by posting the new Terms on this page. You are advised to review these Terms periodically for any changes. Changes to these Terms are effective when they are posted on this page.</text:p>
      <text:h text:style-name="P2" text:outline-level="4"><text:span text:style-name="T4">7</text:span>. Governing Law</text:h>
      <text:p text:style-name="P8">These Terms shall be governed and construed in accordance with the laws of <text:span text:style-name="T4">the Netherlands</text:span>, without regard to its conflict of law provisions.</text:p>
      <text:h text:style-name="P2" text:outline-level="4">9. Contact Us</text:h>
      <text:p text:style-name="P8">If you have any questions about these Terms, please contact us at:</text:p>
      <text:list text:style-name="L2">
        <text:list-item>
          <text:p text:style-name="P11">Email: <text:span text:style-name="T4">222855@buas.nl</text:span></text:p>
        </text:list-item>
      </text:lis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1" style:font-family-complex="'Noto Sans'"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0:58:16.347982025</meta:creation-date>
    <dc:date>2024-06-11T11:04:20.104359551</dc:date>
    <meta:editing-duration>PT6M5S</meta:editing-duration>
    <meta:editing-cycles>1</meta:editing-cycles>
    <meta:document-statistic meta:table-count="0" meta:image-count="1" meta:object-count="0" meta:page-count="2" meta:paragraph-count="35" meta:word-count="594" meta:character-count="3544" meta:non-whitespace-character-count="2990"/>
    <meta:generator>LibreOffice/24.2.4.2$Linux_X86_64 LibreOffice_project/51a6219feb6075d9a4c46691dcfe0cd9c4fff3c2</meta:generator>
  </office:meta>
</office:document-meta>
</file>