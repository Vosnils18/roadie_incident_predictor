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5000001259FF82A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4">
      <style:paragraph-properties fo:text-align="start" style:justify-single-word="false"/>
      <style:text-properties fo:font-size="14pt" officeooo:rsid="001d895d" officeooo:paragraph-rsid="001d895d" style:font-size-asian="14pt" style:font-size-complex="14pt"/>
    </style:style>
    <style:style style:name="P2" style:family="paragraph" style:parent-style-name="Heading_20_4">
      <style:text-properties fo:font-size="14pt" style:font-size-asian="14pt" style:font-size-complex="14pt"/>
    </style:style>
    <style:style style:name="P3" style:family="paragraph" style:parent-style-name="Heading_20_5">
      <style:text-properties fo:font-size="12pt" style:font-size-asian="12pt" style:font-size-complex="12pt"/>
    </style:style>
    <style:style style:name="P4" style:family="paragraph" style:parent-style-name="Standard">
      <style:paragraph-properties fo:text-align="start" style:justify-single-word="false"/>
      <style:text-properties officeooo:rsid="001d895d" officeooo:paragraph-rsid="001d895d"/>
    </style:style>
    <style:style style:name="P5" style:family="paragraph" style:parent-style-name="Standard">
      <style:paragraph-properties fo:text-align="start" style:justify-single-word="false"/>
      <style:text-properties fo:font-size="32pt" fo:font-weight="bold" officeooo:rsid="001d895d" officeooo:paragraph-rsid="001d895d" style:font-size-asian="32pt" style:font-weight-asian="bold" style:font-size-complex="32pt" style:font-weight-complex="bold"/>
    </style:style>
    <style:style style:name="P6" style:family="paragraph" style:parent-style-name="Standard">
      <style:paragraph-properties fo:text-align="start" style:justify-single-word="false"/>
      <style:text-properties fo:color="#1c1c1c" loext:opacity="100%" officeooo:rsid="001d895d" officeooo:paragraph-rsid="001d895d"/>
    </style:style>
    <style:style style:name="P7" style:family="paragraph" style:parent-style-name="Standard">
      <style:paragraph-properties fo:text-align="start" style:justify-single-word="false"/>
      <style:text-properties fo:font-size="12pt" officeooo:rsid="001d895d" officeooo:paragraph-rsid="001d895d"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list-style-name="L1">
      <style:paragraph-properties fo:margin-top="0in" fo:margin-bottom="0in" style:contextual-spacing="false"/>
      <style:text-properties fo:font-size="12pt"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letter-spacing="normal" fo:font-style="normal" fo:font-weight="normal"/>
    </style:style>
    <style:style style:name="P11" style:family="paragraph" style:parent-style-name="Text_20_body">
      <style:paragraph-properties fo:margin-left="0in" fo:margin-right="0in" fo:orphans="2" fo:widows="2" fo:text-indent="0in" style:auto-text-indent="false"/>
    </style:style>
    <style:style style:name="P12" style:family="paragraph">
      <loext:graphic-properties draw:fill-color="#333333"/>
      <style:paragraph-properties fo:text-align="center"/>
    </style:style>
    <style:style style:name="T1" style:family="text">
      <style:text-properties fo:color="#666666" loext:opacity="100%"/>
    </style:style>
    <style:style style:name="T2" style:family="text">
      <style:text-properties fo:font-weight="bold" style:font-weight-asian="bold" style:font-weight-complex="bold"/>
    </style:style>
    <style:style style:name="T3" style:family="text">
      <style:text-properties fo:color="#333333" loext:opacity="100%"/>
    </style:style>
    <style:style style:name="T4" style:family="text">
      <style:text-properties fo:color="#333333" loext:opacity="100%" fo:font-weight="bold" style:font-weight-asian="bold" style:font-weight-complex="bold"/>
    </style:style>
    <style:style style:name="T5" style:family="text">
      <style:text-properties fo:font-style="italic"/>
    </style:style>
    <style:style style:name="T6" style:family="text">
      <style:text-properties fo:font-variant="normal" fo:text-transform="none" fo:color="#000000" loext:opacity="100%" fo:letter-spacing="normal"/>
    </style:style>
    <style:style style:name="T7" style:family="text">
      <style:text-properties fo:font-variant="normal" fo:text-transform="none" fo:color="#000000" loext:opacity="100%" style:font-name="Calibri" fo:letter-spacing="normal" fo:font-style="italic" fo:font-weight="normal"/>
    </style:style>
    <style:style style:name="T8" style:family="text">
      <style:text-properties fo:font-variant="normal" fo:text-transform="none" fo:color="#000000" loext:opacity="100%" style:font-name="Calibri" fo:letter-spacing="normal" fo:font-style="normal" fo:font-weight="normal"/>
    </style:style>
    <style:style style:name="T9" style:family="text">
      <style:text-properties officeooo:rsid="001f5a3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8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width="0.0201in" svg:stroke-color="#333333" draw:fill-color="#333333"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ivacy Policy<draw:frame draw:style-name="fr1" draw:name="Image1" text:anchor-type="char" svg:x="5.4744in" svg:y="-0.2453in" svg:width="0.9783in" svg:height="1.0984in" draw:z-index="1"><draw:image xlink:href="Pictures/1000000100000105000001259FF82AB7.png" xlink:type="simple" xlink:show="embed" xlink:actuate="onLoad" draw:mime-type="image/png"/></draw:frame></text:p>
      <text:p text:style-name="P6"><text:span text:style-name="T4">Last updated:</text:span><text:span text:style-name="T3"> </text:span><text:span text:style-name="T1">11. 06. 2024</text:span></text:p>
      <text:p text:style-name="P6"><text:span text:style-name="T1"/></text:p>
      <text:p text:style-name="P4"><draw:line text:anchor-type="paragraph" draw:z-index="0" draw:name="Horizontal line 1" draw:style-name="gr1" draw:text-style-name="P12" svg:x1="-0.0598in" svg:y1="0.0835in" svg:x2="6.7421in" svg:y2="0.0835in"><text:p/></draw:line></text:p>
      <text:p text:style-name="P4"/>
      <text:h text:style-name="P1" text:outline-level="4">Introduction</text:h>
      <text:p text:style-name="P8">Welcome to <text:span text:style-name="T9">Roadie</text:span>! Your privacy is important to us. This Privacy Policy explains how we collect, use, disclose, and safeguard your information when you use our mobile application (the "App"). Please read this privacy policy carefully. If you do not agree with the terms of this privacy policy, please do not access the App.</text:p>
      <text:h text:style-name="P2" text:outline-level="4">1. Information We Collect</text:h>
      <text:h text:style-name="P3" text:outline-level="5">1.1. Personal Information</text:h>
      <text:p text:style-name="P8">We may collect personal identification information from Users in a variety of ways, including, but not limited to, when Users <text:span text:style-name="T9">use</text:span> the App, register on the App, and in connection with other activities, services, features, or resources we make available on our App. Users may be asked for, as appropriate, name, email address. Users can always refuse to supply personally identifiable information, except that it may prevent them from engaging in certain App-related activities.</text:p>
      <text:h text:style-name="P3" text:outline-level="5">1.2. Non-Personal Information</text:h>
      <text:p text:style-name="P8">We may collect non-personal identification information about Users whenever they interact with our App. Non-personal identification information may include the browser name, the type of device and technical information about Users' means of connection to our App, such as the operating system and the Internet service providers utilized and other similar information.</text:p>
      <text:h text:style-name="P3" text:outline-level="5">1.3. Weather Data</text:h>
      <text:p text:style-name="P8">Our App collects real-time weather data from third-party services. This data is used in conjunction with our predictive models to analyze and forecast incident probabilities and severities.</text:p>
      <text:h text:style-name="P3" text:outline-level="5">1.4. Firebase Data</text:h>
      <text:p text:style-name="P8">We use Firebase for data storage and analytics. Firebase may collect information such as device information, log information, location information, and usage data.</text:p>
      <text:p text:style-name="P8"/>
      <text:h text:style-name="P2" text:outline-level="4">2. How We Use Collected Information</text:h>
      <text:h text:style-name="P3" text:outline-level="5">2.1. To Provide and Improve Our Services</text:h>
      <text:p text:style-name="P8">We use the collected data to provide and improve our services. This includes using real-time weather data and predictive models to forecast incidents and their severities.</text:p>
      <text:h text:style-name="P3" text:outline-level="5"><text:soft-page-break/>2.2. To Personalize User Experience</text:h>
      <text:p text:style-name="P8">We may use aggregated data to understand how our Users as a group use the services and resources provided on our App.</text:p>
      <text:h text:style-name="P3" text:outline-level="5">2.3. To Improve Customer Service</text:h>
      <text:p text:style-name="P8">Information you provide helps us respond to your customer service requests and support needs more efficiently.</text:p>
      <text:h text:style-name="P3" text:outline-level="5">2.4. To Send Periodic Emails</text:h>
      <text:p text:style-name="P8">We may use the email address to send User information and updates pertaining to their usage of the App. It may also be used to respond to their inquiries, questions, and/or other requests.</text:p>
      <text:p text:style-name="P8"/>
      <text:h text:style-name="P2" text:outline-level="4">3. How We Protect Your Information</text:h>
      <text:p text:style-name="P8">We adopt appropriate data collection, storage, and processing practices and security measures to protect against unauthorized access, alteration, disclosure, or destruction of your personal information, username, password, transaction information, and data stored on our App.</text:p>
      <text:p text:style-name="P8"/>
      <text:h text:style-name="P2" text:outline-level="4">4. Sharing Your Information</text:h>
      <text:h text:style-name="P3" text:outline-level="5">4.1. With Service Providers</text:h>
      <text:p text:style-name="P8">We may share information with third parties that perform services on our behalf, such as data analysis, email delivery, hosting services, customer service, and marketing assistance.</text:p>
      <text:h text:style-name="P3" text:outline-level="5">4.2. For Legal Purposes</text:h>
      <text:p text:style-name="P8">We may share information as required by law or to respond to legal processes, to protect our users, to maintain the security of our services, and to safeguard our rights.</text:p>
      <text:h text:style-name="P3" text:outline-level="5">4.3. Business Transfers</text:h>
      <text:p text:style-name="P8">We may share or transfer your information in connection with, or during negotiations of, any merger, sale of company assets, financing, or acquisition of all or a portion of our business to another company.</text:p>
      <text:p text:style-name="P8"/>
      <text:h text:style-name="P2" text:outline-level="4">5. Third-Party Services</text:h>
      <text:p text:style-name="P8">Our App may contain links to third-party websites and services. We do not control these third-party services and are not responsible for their privacy practices. We encourage you to review the privacy policies of these third-party services.</text:p>
      <text:h text:style-name="P2" text:outline-level="4"><text:soft-page-break/>6. Your Privacy Rights</text:h>
      <text:p text:style-name="P8">Depending on your location, you may have certain rights regarding your personal information, such as the right to access, correct, or delete your personal data. To exercise these rights, please contact us at [Contact Information].</text:p>
      <text:p text:style-name="P8"/>
      <text:h text:style-name="P2" text:outline-level="4">7. Changes to This Privacy Policy</text:h>
      <text:p text:style-name="P8">We may update our Privacy Policy from time to time. We will notify you of any changes by posting the new Privacy Policy on this page. You are advised to review this Privacy Policy periodically for any changes. Changes to this Privacy Policy are effective when they are posted on this page.</text:p>
      <text:p text:style-name="P8"/>
      <text:h text:style-name="P2" text:outline-level="4">8. Contact Us</text:h>
      <text:p text:style-name="P8">If you have any questions about this Privacy Policy, please contact us at:</text:p>
      <text:list text:style-name="L1">
        <text:list-item>
          <text:p text:style-name="P9">Email: <text:span text:style-name="T9">222855@buas.nl</text:span></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1" style:font-family-complex="'Noto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letter-spacing="normal" fo:font-style="normal" fo:font-weight="normal"/>
    </style:style>
    <style:style style:name="MP2" style:family="paragraph" style:parent-style-name="Text_20_body">
      <style:paragraph-properties fo:margin-left="0in" fo:margin-right="0in" fo:orphans="2" fo:widows="2" fo:text-indent="0in" style:auto-text-indent="false"/>
    </style:style>
    <style:style style:name="MT1" style:family="text">
      <style:text-properties fo:font-style="italic"/>
    </style:style>
    <style:style style:name="MT2" style:family="text">
      <style:text-properties fo:font-variant="normal" fo:text-transform="none" fo:color="#000000" loext:opacity="100%" fo:letter-spacing="normal"/>
    </style:style>
    <style:style style:name="MT3" style:family="text">
      <style:text-properties fo:font-variant="normal" fo:text-transform="none" fo:color="#000000" loext:opacity="100%" style:font-name="Calibri" fo:letter-spacing="normal" fo:font-style="italic" fo:font-weight="normal"/>
    </style:style>
    <style:style style:name="MT4" style:family="text">
      <style:text-properties fo:font-variant="normal" fo:text-transform="none" fo:color="#000000" loext:opacity="100%" style:font-name="Calibri" fo:letter-spacing="normal" fo:font-style="normal" fo:font-weight="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Intersoft Consulting. (2018). <text:span text:style-name="MT1">General data protection regulation (GDPR)</text:span>. General Data Protection Regulation (GDPR). https://gdpr-info.eu/</text:p>
        <text:p text:style-name="MP2"><text:span text:style-name="MT2">‌</text:span><text:span text:style-name="MT3">Google Cloud Platform Terms Of Service</text:span><text:span text:style-name="MT4">. (n.d.). Google Cloud. https://cloud.google.com/terms/</text:span></text:p>
        <text:p text:style-name="MP2"/>
      </style:footer>
      <style:footer-left>
        <text:p text:style-name="MP2"/>
      </style:footer-left>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0:40:04.283717327</meta:creation-date>
    <dc:date>2024-06-11T10:55:43.502248515</dc:date>
    <meta:editing-duration>PT4M52S</meta:editing-duration>
    <meta:editing-cycles>1</meta:editing-cycles>
    <meta:document-statistic meta:table-count="0" meta:image-count="1" meta:object-count="0" meta:page-count="3" meta:paragraph-count="44" meta:word-count="731" meta:character-count="4814" meta:non-whitespace-character-count="4130"/>
    <meta:generator>LibreOffice/24.2.4.2$Linux_X86_64 LibreOffice_project/51a6219feb6075d9a4c46691dcfe0cd9c4fff3c2</meta:generator>
  </office:meta>
</office:document-meta>
</file>