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C000001D4C875F5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style:writing-mode="lr-tb"/>
    </style:style>
    <style:style style:name="P4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 style:list-style-name="L4"/>
    <style:style style:name="P7" style:family="paragraph" style:parent-style-name="Preformatted_20_Text" style:list-style-name="L4">
      <style:paragraph-properties style:writing-mode="lr-tb"/>
    </style:style>
    <style:style style:name="P8" style:family="paragraph" style:parent-style-name="Preformatted_20_Text" style:list-style-name="L4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4">
      <style:paragraph-properties fo:margin-left="0in" fo:margin-right="0in" fo:text-indent="0in" style:auto-text-indent="false" style:writing-mode="lr-tb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17d982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paragraph-rsid="001a0878"/>
    </style:style>
    <style:style style:name="P16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fo:font-weight="bold" officeooo:paragraph-rsid="001a0878" style:font-weight-asian="bold" style:font-weight-complex="bold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fo:font-weight="bold" officeooo:rsid="001a0878" officeooo:paragraph-rsid="001a0878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8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eprocessing Steps Documentation</text:h>
      <text:p text:style-name="P26"/>
      <text:list text:style-name="L4">
        <text:list-item>
          <text:p text:style-name="P24"><text:span text:style-name="Strong_20_Emphasis">Data Cleaning:</text:span></text:p>
          <text:list>
            <text:list-item>
              <text:p text:style-name="P25"><text:span text:style-name="Strong_20_Emphasis">Handling Missing Values:</text:span></text:p>
              <text:list>
                <text:list-item>
                  <text:p text:style-name="P25">Missing values were addressed through imputation or exclusion where appropriate.</text:p>
                </text:list-item>
              </text:list>
            </text:list-item>
            <text:list-item>
              <text:p text:style-name="P25"><text:span text:style-name="Strong_20_Emphasis">Removing Duplicates:</text:span></text:p>
              <text:list>
                <text:list-item>
                  <text:p text:style-name="P25">Duplicate rows were identified and removed to ensure data integrity.</text:p>
                </text:list-item>
              </text:list>
            </text:list-item>
          </text:list>
        </text:list-item>
        <text:list-item>
          <text:p text:style-name="P24"><text:span text:style-name="Strong_20_Emphasis">Feature Engineering Steps:</text:span></text:p>
          <text:list>
            <text:list-item>
              <text:p text:style-name="P24"><text:span text:style-name="Strong_20_Emphasis">Datetime Conversion:</text:span></text:p>
              <text:list>
                <text:list-item>
                  <text:p text:style-name="P25"><text:span text:style-name="Strong_20_Emphasis">Columns:</text:span> <text:span text:style-name="Source_20_Text">datetime_s</text:span> and <text:span text:style-name="Source_20_Text">datetime_e</text:span></text:p>
                </text:list-item>
                <text:list-item>
                  <text:p text:style-name="P25"><text:span text:style-name="Strong_20_Emphasis">Description:</text:span> Converted datetime columns to datetime objects using <text:span text:style-name="Source_20_Text">pd.to_datetime</text:span>.</text:p>
                </text:list-item>
                <text:list-item>
                  <text:p text:style-name="P25"><text:span text:style-name="Strong_20_Emphasis">Purpose:</text:span> Enables time-based analysis and modeling.</text:p>
                </text:list-item>
              </text:list>
            </text:list-item>
            <text:list-item>
              <text:p text:style-name="P24"><text:span text:style-name="Strong_20_Emphasis">Categorical Encoding:</text:span></text:p>
              <text:list>
                <text:list-item>
                  <text:p text:style-name="P25"><text:span text:style-name="Strong_20_Emphasis">Columns:</text:span> <text:span text:style-name="Source_20_Text">event_cat</text:span>, <text:span text:style-name="Source_20_Text">event_sev</text:span>, <text:span text:style-name="Source_20_Text">streetname</text:span>, <text:span text:style-name="Source_20_Text">light_condition</text:span>, <text:span text:style-name="Source_20_Text">accident_sev</text:span></text:p>
                </text:list-item>
                <text:list-item>
                  <text:p text:style-name="P25"><text:span text:style-name="Strong_20_Emphasis">Description:</text:span> Encoded categorical variables using <text:span text:style-name="Source_20_Text">LabelEncoder</text:span>.</text:p>
                </text:list-item>
                <text:list-item>
                  <text:p text:style-name="P25"><text:span text:style-name="Strong_20_Emphasis">Purpose:</text:span> Transformed categorical data into numerical format suitable for machine learning models.</text:p>
                </text:list-item>
              </text:list>
            </text:list-item>
            <text:list-item>
              <text:p text:style-name="P24"><text:span text:style-name="Strong_20_Emphasis">Datetime Conversion Details:</text:span></text:p>
              <text:list>
                <text:list-item>
                  <text:p text:style-name="P25"><text:span text:style-name="Strong_20_Emphasis">Implementation:</text:span> Used <text:span text:style-name="Source_20_Text">pd.to_datetime</text:span> function.</text:p>
                </text:list-item>
                <text:list-item>
                  <text:p text:style-name="P24"><text:span text:style-name="Strong_20_Emphasis">Code:</text:span></text:p>
                  <text:p text:style-name="P6">python</text:p>
                  <text:p text:style-name="P6">Copy code</text:p>
                  <text:p text:style-name="P9"><text:span text:style-name="Source_20_Text">for column in ['datetime_s', 'datetime_e']:</text:span></text:p>
                  <text:p text:style-name="P8"><text:span text:style-name="Source_20_Text"><text:s text:c="4"/>df[column] = pd.to_datetime(df[column])</text:span></text:p>
                </text:list-item>
                <text:list-item>
                  <text:p text:style-name="P25"><text:span text:style-name="Strong_20_Emphasis">Benefits:</text:span></text:p>
                  <text:list>
                    <text:list-item>
                      <text:p text:style-name="P25">Facilitates chronological analysis of events.</text:p>
                    </text:list-item>
                    <text:list-item>
                      <text:p text:style-name="P25">Supports time-based feature extraction (e.g., day of week, hour of day).</text:p>
                    </text:list-item>
                  </text:list>
                </text:list-item>
              </text:list>
            </text:list-item>
            <text:list-item>
              <text:p text:style-name="P24"><text:span text:style-name="Strong_20_Emphasis">Categorical Encoding Details:</text:span></text:p>
              <text:list>
                <text:list-item>
                  <text:p text:style-name="P25"><text:span text:style-name="Strong_20_Emphasis">Implementation:</text:span> Used <text:span text:style-name="Source_20_Text">LabelEncoder</text:span> for each categorical column.</text:p>
                </text:list-item>
                <text:list-item>
                  <text:p text:style-name="P24"><text:span text:style-name="Strong_20_Emphasis">Code:</text:span></text:p>
                  <text:p text:style-name="P6">python</text:p>
                  <text:p text:style-name="P6">Copy code</text:p>
                  <text:p text:style-name="P9"><text:span text:style-name="Source_20_Text">encoder = LabelEncoder()</text:span></text:p>
                  <text:p text:style-name="P7"><text:span text:style-name="Source_20_Text">for column in ['event_cat', 'event_sev', 'streetname', 'light_condition', 'accident_sev']:</text:span></text:p>
                  <text:p text:style-name="P7"><text:span text:style-name="Source_20_Text"><text:s text:c="4"/>df[column] = encoder.fit_transform(df[column])</text:span></text:p>
                  <text:p text:style-name="P7"><text:span text:style-name="Source_20_Text"><text:s text:c="4"/>if column == 'streetname':</text:span></text:p>
                  <text:p text:style-name="P8"><text:soft-page-break/><text:span text:style-name="Source_20_Text"><text:s text:c="8"/>np.save('weights_files/classes_streetname.npy', encoder.classes_)</text:span></text:p>
                </text:list-item>
                <text:list-item>
                  <text:p text:style-name="P25"><text:span text:style-name="Strong_20_Emphasis">Benefits:</text:span></text:p>
                  <text:list>
                    <text:list-item>
                      <text:p text:style-name="P25">Converts textual categories into numeric representations.</text:p>
                    </text:list-item>
                    <text:list-item>
                      <text:p text:style-name="P25">Prepares data for input into machine learning models that require numerical inputs.</text:p>
                    </text:list-item>
                  </text:list>
                </text:list-item>
              </text:list>
            </text:list-item>
            <text:list-item>
              <text:p text:style-name="P24"><text:span text:style-name="Strong_20_Emphasis">File Saving (Optional):</text:span></text:p>
              <text:list>
                <text:list-item>
                  <text:p text:style-name="P25"><text:span text:style-name="Strong_20_Emphasis">Details:</text:span> Saved encoded classes for <text:span text:style-name="Source_20_Text">streetname</text:span> using <text:span text:style-name="Source_20_Text">np.save</text:span>.</text:p>
                </text:list-item>
                <text:list-item>
                  <text:p text:style-name="P25"><text:span text:style-name="Strong_20_Emphasis">Purpose:</text:span> Preserves the mapping of categorical labels to numerical codes for future reference or deployment.</text:p>
                </text:list-item>
              </text:list>
            </text:list-item>
            <text:list-item>
              <text:p text:style-name="P24"><text:span text:style-name="Strong_20_Emphasis">Integration with Additional Feature Engineering (Not Shown):</text:span></text:p>
              <text:list>
                <text:list-item>
                  <text:p text:style-name="P25"><text:span text:style-name="Strong_20_Emphasis">Details:</text:span> Calls <text:span text:style-name="Source_20_Text">feature_eng.main(data)</text:span> after initial preprocessing.</text:p>
                </text:list-item>
                <text:list-item>
                  <text:p text:style-name="P25"><text:span text:style-name="Strong_20_Emphasis">Purpose:</text:span> Executes additional feature transformations specific to the application domain (e.g., domain-specific calculations, derived features).</text:p>
                </text:list-item>
              </text:list>
            </text:list-item>
          </text:list>
        </text:list-item>
        <text:list-item>
          <text:p text:style-name="P24"><text:span text:style-name="Strong_20_Emphasis">Outlier Handling:</text:span></text:p>
          <text:list>
            <text:list-item>
              <text:p text:style-name="P25"><text:span text:style-name="Strong_20_Emphasis">Handling Outliers in accident_prob:</text:span></text:p>
              <text:list>
                <text:list-item>
                  <text:p text:style-name="P25">Rows with accident_prob exceeding 100 were removed to prevent bias in predictions, as accident probability is a percentage and cannot exceed 100.</text:p>
                </text:list-item>
              </text:list>
            </text:list-item>
          </text:list>
        </text:list-item>
        <text:list-item>
          <text:p text:style-name="P24"><text:span text:style-name="Strong_20_Emphasis">Integration and Data Retrieval:</text:span></text:p>
          <text:list>
            <text:list-item>
              <text:p text:style-name="P25"><text:span text:style-name="Strong_20_Emphasis">Data Retrieval:</text:span></text:p>
              <text:list>
                <text:list-item>
                  <text:p text:style-name="P25">Data was fetched from the PostgreSQL database table <text:span text:style-name="Source_20_Text">group14_warehouse.regression_data</text:span> using a SQL query.</text:p>
                </text:list-item>
              </text:list>
            </text:list-item>
          </text:list>
        </text:list-item>
        <text:list-item>
          <text:p text:style-name="P24"><text:span text:style-name="Strong_20_Emphasis">Data Normalization:</text:span></text:p>
          <text:list>
            <text:list-item>
              <text:p text:style-name="P25"><text:span text:style-name="Strong_20_Emphasis">Normalization:</text:span></text:p>
              <text:list>
                <text:list-item>
                  <text:p text:style-name="P25">Data normalization was performed using <text:span text:style-name="Source_20_Text">StandardScaler</text:span> to ensure consistent scale across features.</text:p>
                </text:list-item>
              </text:list>
            </text:list-item>
          </text:list>
        </text:list-item>
        <text:list-item>
          <text:p text:style-name="P24"><text:span text:style-name="Strong_20_Emphasis">Schema Diagram of Data Warehouse:</text:span></text:p>
        </text:list-item>
      </text:list>
      <text:p text:style-name="P23"><text:span text:style-name="Strong_20_Emphasis"/></text:p>
      <text:list text:style-name="L1">
        <text:list-item>
          <text:list>
            <text:list-item>
              <text:p text:style-name="P14"><draw:frame draw:style-name="fr1" draw:name="Image1" text:anchor-type="char" svg:width="5.9047in" svg:height="2.2209in" draw:z-index="0"><draw:image xlink:href="Pictures/10000001000004DC000001D4C875F5F5.png" xlink:type="simple" xlink:show="embed" xlink:actuate="onLoad" draw:mime-type="image/png"/></draw:frame></text:p>
            </text:list-item>
          </text:list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7:52.639742614</meta:creation-date>
    <dc:date>2024-06-21T12:22:50.877575600</dc:date>
    <meta:editing-duration>PT34M47S</meta:editing-duration>
    <meta:editing-cycles>2</meta:editing-cycles>
    <meta:generator>LibreOffice/24.2.4.2$Linux_X86_64 LibreOffice_project/51a6219feb6075d9a4c46691dcfe0cd9c4fff3c2</meta:generator>
    <meta:document-statistic meta:table-count="0" meta:image-count="1" meta:object-count="0" meta:page-count="2" meta:paragraph-count="55" meta:word-count="344" meta:character-count="2563" meta:non-whitespace-character-count="2307"/>
  </office:meta>
</office:document-meta>
</file>